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8000000B197B97E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3.327cm" draw:z-index="0"><draw:image xlink:href="Pictures/1000000100000388000000B197B97E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03T08:14:11.025000000</dc:date>
    <meta:editing-duration>PT48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